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0mm" svg:y="95.02mm">
            <loext:p draw:notify-on-update-of-ranges="Sheet1.A16:Sheet1.B16 Sheet1.A17:Sheet1.B17 Sheet1.A17:Sheet1.B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144012" calcext:value-type="float">
            <text:p>0.144012</text:p>
          </table:table-cell>
          <table:table-cell office:value-type="float" office:value="0.162432" calcext:value-type="float">
            <text:p>0.162432</text:p>
          </table:table-cell>
        </table:table-row>
        <table:table-row table:style-name="ro1">
          <table:table-cell office:value-type="float" office:value="0.142431" calcext:value-type="float">
            <text:p>0.142431</text:p>
          </table:table-cell>
          <table:table-cell office:value-type="float" office:value="0.162432" calcext:value-type="float">
            <text:p>0.162432</text:p>
          </table:table-cell>
        </table:table-row>
        <table:table-row table:style-name="ro1">
          <table:table-cell office:value-type="float" office:value="0.143771" calcext:value-type="float">
            <text:p>0.143771</text:p>
          </table:table-cell>
          <table:table-cell office:value-type="float" office:value="0.16377" calcext:value-type="float">
            <text:p>0.16377</text:p>
          </table:table-cell>
        </table:table-row>
        <table:table-row table:style-name="ro1">
          <table:table-cell office:value-type="float" office:value="0.143743" calcext:value-type="float">
            <text:p>0.143743</text:p>
          </table:table-cell>
          <table:table-cell office:value-type="float" office:value="0.165199" calcext:value-type="float">
            <text:p>0.165199</text:p>
          </table:table-cell>
        </table:table-row>
        <table:table-row table:style-name="ro1">
          <table:table-cell office:value-type="float" office:value="0.14724" calcext:value-type="float">
            <text:p>0.14724</text:p>
          </table:table-cell>
          <table:table-cell office:value-type="float" office:value="0.172073" calcext:value-type="float">
            <text:p>0.172073</text:p>
          </table:table-cell>
        </table:table-row>
        <table:table-row table:style-name="ro1">
          <table:table-cell office:value-type="float" office:value="0.141188" calcext:value-type="float">
            <text:p>0.141188</text:p>
          </table:table-cell>
          <table:table-cell office:value-type="float" office:value="0.163001" calcext:value-type="float">
            <text:p>0.163001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table:formula="of:=SUM([.A1:.A6])" office:value-type="float" office:value="0.862385" calcext:value-type="float">
            <text:p>0.862385</text:p>
          </table:table-cell>
          <table:table-cell table:formula="of:=SUM([.B1:.B6])" office:value-type="float" office:value="0.988907" calcext:value-type="float">
            <text:p>0.988907</text:p>
          </table:table-cell>
        </table:table-row>
        <table:table-row table:style-name="ro1">
          <table:table-cell table:formula="of:=[.A15]/6" office:value-type="float" office:value="0.143730833333333" calcext:value-type="float">
            <text:p>0.1437308333</text:p>
          </table:table-cell>
          <table:table-cell table:formula="of:=[.B15]/6" office:value-type="float" office:value="0.164817833333333" calcext:value-type="float">
            <text:p>0.1648178333</text:p>
          </table:table-cell>
        </table:table-row>
        <table:table-row table:style-name="ro1">
          <table:table-cell table:formula="of:=STDEV([.A1:.A6])" office:value-type="float" office:value="0.00202734480704854" calcext:value-type="float">
            <text:p>0.0020273448</text:p>
          </table:table-cell>
          <table:table-cell table:formula="of:=STDEV([.B1:.B6])" office:value-type="float" office:value="0.00370313302038513" calcext:value-type="float">
            <text:p>0.0037031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0:37:13.297324887</meta:creation-date>
    <dc:date>2017-11-15T10:49:46.778249482</dc:date>
    <meta:editing-duration>PT2M23S</meta:editing-duration>
    <meta:editing-cycles>1</meta:editing-cycles>
    <meta:generator>LibreOffice/5.1.6.2$Linux_X86_64 LibreOffice_project/10m0$Build-2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A17:Sheet1.B17" chart:error-lower-range="Sheet1.A17:Sheet1.B17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heet1.A17:Sheet1.B17" chart:error-lower-range="Sheet1.A17:Sheet1.B17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A17:Sheet1.B17" chart:error-lower-range="Sheet1.A17:Sheet1.B17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Sheet1.A16:Sheet1.B16" svg:x="0.32cm" svg:y="0.18cm" svg:width="13.467cm" svg:height="8.64cm">
          <chartooo:coordinate-region svg:x="1.418cm" svg:y="0.379cm" svg:width="12.36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6:Sheet1.B16" chart:class="chart:bar">
            <chart:error-indicator chart:style-name="ch8" chart:dimension="y"/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.143730833333333">
                <text:p>0.143730833333333</text:p>
                <draw:g>
                  <svg:desc>Sheet1.A16:Sheet1.B16</svg:desc>
                </draw:g>
              </table:table-cell>
              <table:table-cell office:value-type="float" office:value="0.164817833333333">
                <text:p>0.164817833333333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00202734480704854">
                <text:p>0.00202734480704854</text:p>
                <draw:g>
                  <svg:desc>Sheet1.A17:Sheet1.B17</svg:desc>
                </draw:g>
              </table:table-cell>
              <table:table-cell office:value-type="float" office:value="0.00370313302038513">
                <text:p>0.00370313302038513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00202734480704854">
                <text:p>0.00202734480704854</text:p>
                <draw:g>
                  <svg:desc>Sheet1.A17:Sheet1.B17</svg:desc>
                </draw:g>
              </table:table-cell>
              <table:table-cell office:value-type="float" office:value="0.00370313302038513">
                <text:p>0.003703133020385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